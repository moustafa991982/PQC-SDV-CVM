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10000001000005C30000036863957D03E9AF604A.png" manifest:media-type="image/png"/>
  <manifest:file-entry manifest:full-path="Object 1/Pictures/1000000100000404000001AA65A7B9B1BD39AD7C.png" manifest:media-type="image/png"/>
  <manifest:file-entry manifest:full-path="Object 1/settings.xml" manifest:media-type="text/xml"/>
  <manifest:file-entry manifest:full-path="Object 1/" manifest:version="1.3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30000036863957D03E9AF604A.png" manifest:media-type="image/png"/>
  <manifest:file-entry manifest:full-path="Pictures/1000000100000404000001AA65A7B9B1BD39AD7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Valuable screen shots</text:p>
          </draw:text-box>
        </draw:frame>
        <draw:frame draw:style-name="gr1" draw:text-style-name="P3" draw:layer="layout" svg:width="28.939cm" svg:height="20.765cm" svg:x="15.899cm" svg:y="8.7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7.198cm" svg:height="11.27cm" svg:x="0.434cm" svg:y="2.256cm">
          <draw:image xlink:href="Pictures/1000000100000404000001AA65A7B9B1BD39AD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6.639cm" svg:height="15.749cm" svg:x="0.713cm" svg:y="0.016cm">
          <draw:image xlink:href="Pictures/10000001000005C30000036863957D03E9AF60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5-11T11:59:01.762137311</meta:creation-date>
    <dc:date>2026-05-13T00:27:47.429977786</dc:date>
    <meta:editing-duration>PT3M54S</meta:editing-duration>
    <meta:editing-cycles>3</meta:editing-cycles>
    <meta:generator>LibreOffice/7.3.7.2$Linux_X86_64 LibreOffice_project/30$Build-2</meta:generator>
    <meta:document-statistic meta:object-count="3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Valuable screen sho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198cm" svg:height="11.27cm" svg:x="0.434cm" svg:y="2.256cm">
          <draw:image xlink:href="Pictures/1000000100000404000001AA65A7B9B1BD39AD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6.639cm" svg:height="15.749cm" svg:x="0.713cm" svg:y="0.016cm">
          <draw:image xlink:href="Pictures/10000001000005C30000036863957D03E9AF60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